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ucida Console" svg:font-family="'Lucida Console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Lucida Console" officeooo:rsid="00241c8d" officeooo:paragraph-rsid="00241c8d"/>
    </style:style>
    <style:style style:name="T1" style:family="text">
      <style:text-properties officeooo:rsid="002572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nrise 2/<text:span text:style-name="T1">3</text:span></text:p>
      <text:p text:style-name="P1"/>
      <text:p text:style-name="P1">this new day's wonder</text:p>
      <text:p text:style-name="P1">distant orb with life's source glows</text:p>
      <text:p text:style-name="P1">from hidden night's calm</text:p>
      <text:p text:style-name="P1"/>
      <text:p text:style-name="P1">fires' colors emerge</text:p>
      <text:p text:style-name="P1">my day's new purpose instructs</text:p>
      <text:p text:style-name="P1">brings resolve to know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ucida Console" svg:font-family="'Lucida Console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8M30S</meta:editing-duration>
    <meta:editing-cycles>7</meta:editing-cycles>
    <meta:generator>LibreOffice/7.3.7.2$Linux_X86_64 LibreOffice_project/30$Build-2</meta:generator>
    <dc:date>2026-02-06T14:36:50.145114114</dc:date>
    <meta:document-statistic meta:table-count="0" meta:image-count="0" meta:object-count="0" meta:page-count="1" meta:paragraph-count="7" meta:word-count="28" meta:character-count="164" meta:non-whitespace-character-count="143"/>
    <meta:user-defined meta:name="Info 1"/>
    <meta:user-defined meta:name="Info 2"/>
    <meta:user-defined meta:name="Info 3"/>
    <meta:user-defined meta:name="Info 4"/>
  </office:meta>
</office:document-meta>
</file>