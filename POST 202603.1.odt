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Liberation Sans" officeooo:rsid="0016aaac" officeooo:paragraph-rsid="0017ea75"/>
    </style:style>
    <style:style style:name="P2" style:family="paragraph" style:parent-style-name="Standard">
      <style:text-properties style:font-name="Liberation Sans" officeooo:rsid="0016aaac" officeooo:paragraph-rsid="001abb52"/>
    </style:style>
    <style:style style:name="P3" style:family="paragraph" style:parent-style-name="Standard">
      <style:text-properties style:font-name="Liberation Sans" officeooo:rsid="0016aaac" officeooo:paragraph-rsid="00193b98"/>
    </style:style>
    <style:style style:name="P4" style:family="paragraph" style:parent-style-name="Standard">
      <style:text-properties style:font-name="Liberation Sans" officeooo:rsid="00154489" officeooo:paragraph-rsid="0017ea75"/>
    </style:style>
    <style:style style:name="P5" style:family="paragraph" style:parent-style-name="Standard">
      <style:text-properties style:font-name="Liberation Sans" officeooo:rsid="00154489" officeooo:paragraph-rsid="00184314"/>
    </style:style>
    <style:style style:name="P6" style:family="paragraph" style:parent-style-name="Standard">
      <style:text-properties style:font-name="Liberation Sans" officeooo:rsid="00154489" officeooo:paragraph-rsid="00193b98"/>
    </style:style>
    <style:style style:name="P7" style:family="paragraph" style:parent-style-name="Standard">
      <style:text-properties style:font-name="Liberation Sans" officeooo:rsid="0013c463" officeooo:paragraph-rsid="0013c463"/>
    </style:style>
    <style:style style:name="T1" style:family="text">
      <style:text-properties officeooo:rsid="00184314"/>
    </style:style>
    <style:style style:name="T2" style:family="text">
      <style:text-properties officeooo:rsid="0016aaac"/>
    </style:style>
    <style:style style:name="T3" style:family="text">
      <style:text-properties officeooo:rsid="00151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G.SF-03MAR2026.20260302 ==&gt;</text:p>
      <text:p text:style-name="P4"/>
      <text:p text:style-name="P4">** Life finds a safe and serene place</text:p>
      <text:p text:style-name="P4"/>
      <text:p text:style-name="P5">My need to control, to see my expectations become reality.</text:p>
      <text:p text:style-name="P5">I keep hitting that one note,</text:p>
      <text:p text:style-name="P6"><text:span text:style-name="T1">w</text:span>hich then becomes two discordant notes</text:p>
      <text:p text:style-name="P6">and then tonal chaos.</text:p>
      <text:p text:style-name="P6">But life finds a safe and serene place.</text:p>
      <text:p text:style-name="P6">The safety is to entrust myself to that mystery and certainty.</text:p>
      <text:p text:style-name="P6">The serenity is the peaceful connection to <text:span text:style-name="T2">my life</text:span></text:p>
      <text:p text:style-name="P3">as it transpires and unfolds.</text:p>
      <text:p text:style-name="P1">Life finds a safe and serene place.</text:p>
      <text:p text:style-name="P1">Now I’m heading into the later pages of that story.</text:p>
      <text:p text:style-name="P1">Life finds a safe and serene place.</text:p>
      <text:p text:style-name="P2">I can trust and believe,</text:p>
      <text:p text:style-name="P2">walk this walk,</text:p>
      <text:p text:style-name="P2">keeping my eyes open.</text:p>
      <text:p text:style-name="P2">Breathing this air,making my choices</text:p>
      <text:p text:style-name="P2">and <text:span text:style-name="T3">resting in the hope</text:span>.</text:p>
      <text:p text:style-name="P1">Life finds a safe and serene place.</text:p>
      <text:p text:style-name="P2">No pain overwhelms,</text:p>
      <text:p text:style-name="P2">nor discord.</text:p>
      <text:p text:style-name="P2">No regret makes this day recede into that void.</text:p>
      <text:p text:style-name="P1">Life finds a safe and serene plac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54M29S</meta:editing-duration>
    <meta:editing-cycles>18</meta:editing-cycles>
    <meta:generator>LibreOffice/7.3.7.2$Linux_X86_64 LibreOffice_project/30$Build-2</meta:generator>
    <dc:date>2026-03-05T15:31:28.129471976</dc:date>
    <meta:document-statistic meta:table-count="0" meta:image-count="0" meta:object-count="0" meta:page-count="1" meta:paragraph-count="23" meta:word-count="143" meta:character-count="781" meta:non-whitespace-character-count="661"/>
    <meta:user-defined meta:name="Info 1"/>
    <meta:user-defined meta:name="Info 2"/>
    <meta:user-defined meta:name="Info 3"/>
    <meta:user-defined meta:name="Info 4"/>
  </office:meta>
</office:document-meta>
</file>