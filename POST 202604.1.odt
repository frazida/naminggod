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iberation Sans" officeooo:rsid="00154489" officeooo:paragraph-rsid="0017ea75"/>
    </style:style>
    <style:style style:name="P2" style:family="paragraph" style:parent-style-name="Standard">
      <style:text-properties style:font-name="Liberation Sans" officeooo:rsid="0013c463" officeooo:paragraph-rsid="0013c463"/>
    </style:style>
    <style:style style:name="P3" style:family="paragraph" style:parent-style-name="Standard">
      <style:text-properties style:font-name="Liberation Sans" officeooo:rsid="001f98cf" officeooo:paragraph-rsid="001a7eca"/>
    </style:style>
    <style:style style:name="P4" style:family="paragraph" style:parent-style-name="Standard">
      <style:text-properties style:font-name="Liberation Sans" officeooo:rsid="00172db3" officeooo:paragraph-rsid="001a7eca"/>
    </style:style>
    <style:style style:name="T1" style:family="text">
      <style:text-properties officeooo:rsid="00196965"/>
    </style:style>
    <style:style style:name="T2" style:family="text">
      <style:text-properties officeooo:rsid="0011570e"/>
    </style:style>
    <style:style style:name="T3" style:family="text">
      <style:text-properties officeooo:rsid="00121a0a"/>
    </style:style>
    <style:style style:name="T4" style:family="text">
      <style:text-properties officeooo:rsid="00145eed"/>
    </style:style>
    <style:style style:name="T5" style:family="text">
      <style:text-properties officeooo:rsid="0015c8b5"/>
    </style:style>
    <style:style style:name="T6" style:family="text">
      <style:text-properties officeooo:rsid="0015a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P</text:span>.SF-03MAR2026.202603<text:span text:style-name="T1">23</text:span> ==&gt;</text:p>
      <text:p text:style-name="P1"/>
      <text:p text:style-name="P3">** <text:span text:style-name="T2">Dogma will not save me</text:span></text:p>
      <text:p text:style-name="P3"/>
      <text:p text:style-name="P3">Dogma will not save me.</text:p>
      <text:p text:style-name="P3">And I mean the church variety</text:p>
      <text:p text:style-name="P3">and the true believer variety.</text:p>
      <text:p text:style-name="P3">Dogma will not save me.</text:p>
      <text:p text:style-name="P3">The truth must fit a pattern people tell me.</text:p>
      <text:p text:style-name="P3">Tenets seen as authoritative and proclaimed,</text:p>
      <text:p text:style-name="P3">tenets seen as authoritative without <text:span text:style-name="T3">an </text:span>adequate basis.</text:p>
      <text:p text:style-name="P3"><text:span text:style-name="T4">Dubious</text:span> proof and connection to some hierarchy.</text:p>
      <text:p text:style-name="P3">Where does that leave individual conscience,</text:p>
      <text:p text:style-name="P3">intelligence,</text:p>
      <text:p text:style-name="P3">discernment? </text:p>
      <text:p text:style-name="P3">Dogma will not save me.</text:p>
      <text:p text:style-name="P3">I am only one person,</text:p>
      <text:p text:style-name="P3">but I am precisely one person.</text:p>
      <text:p text:style-name="P3">And dogma does not occupy the same space as me</text:p>
      <text:p text:style-name="P3">or inhabit my person.</text:p>
      <text:p text:style-name="P3">Imposed from without,</text:p>
      <text:p text:style-name="P3">denying my personhood.</text:p>
      <text:p text:style-name="P3">Dogma will not save me. </text:p>
      <text:p text:style-name="P3">Save me from sin, they tell me.</text:p>
      <text:p text:style-name="P3"><text:span text:style-name="T5">The</text:span> amazing idea that the</text:p>
      <text:p text:style-name="P3">radical wrongfullness at my core</text:p>
      <text:p text:style-name="P3">can be redeemed by some cosmic force.</text:p>
      <text:p text:style-name="P3">It’s all faith healing,</text:p>
      <text:p text:style-name="P3">healing from addiction in part,</text:p>
      <text:p text:style-name="P3">but also healing from <text:span text:style-name="T6">moral failings,</text:span></text:p>
      <text:p text:style-name="P4">healing from the fea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H40S</meta:editing-duration>
    <meta:editing-cycles>22</meta:editing-cycles>
    <meta:generator>LibreOffice/7.3.7.2$Linux_X86_64 LibreOffice_project/30$Build-2</meta:generator>
    <dc:date>2026-05-08T15:33:52.611765916</dc:date>
    <meta:document-statistic meta:table-count="0" meta:image-count="0" meta:object-count="0" meta:page-count="1" meta:paragraph-count="29" meta:word-count="151" meta:character-count="864" meta:non-whitespace-character-count="740"/>
    <meta:user-defined meta:name="Info 1"/>
    <meta:user-defined meta:name="Info 2"/>
    <meta:user-defined meta:name="Info 3"/>
    <meta:user-defined meta:name="Info 4"/>
  </office:meta>
</office:document-meta>
</file>