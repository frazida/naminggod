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officeooo:rsid="0004738d" officeooo:paragraph-rsid="0004738d"/>
    </style:style>
    <style:style style:name="P3" style:family="paragraph" style:parent-style-name="Standard">
      <style:text-properties style:font-name="Verdana" officeooo:rsid="0004738d" officeooo:paragraph-rsid="0013de91"/>
    </style:style>
    <style:style style:name="P4" style:family="paragraph" style:parent-style-name="Standard">
      <style:text-properties style:font-name="Verdana" officeooo:rsid="0004738d" officeooo:paragraph-rsid="00155a6f"/>
    </style:style>
    <style:style style:name="P5" style:family="paragraph" style:parent-style-name="Standard">
      <style:text-properties style:font-name="Verdana" officeooo:rsid="0004738d" officeooo:paragraph-rsid="00157977"/>
    </style:style>
    <style:style style:name="P6" style:family="paragraph" style:parent-style-name="Standard">
      <style:text-properties style:font-name="Verdana" officeooo:rsid="0004738d" officeooo:paragraph-rsid="0015b0a2"/>
    </style:style>
    <style:style style:name="P7" style:family="paragraph" style:parent-style-name="Standard">
      <style:text-properties style:font-name="Verdana" officeooo:rsid="0006fd06" officeooo:paragraph-rsid="0006fd06"/>
    </style:style>
    <style:style style:name="P8" style:family="paragraph" style:parent-style-name="Standard">
      <style:text-properties style:font-name="Verdana" officeooo:rsid="0006fd06" officeooo:paragraph-rsid="0011d707"/>
    </style:style>
    <style:style style:name="P9" style:family="paragraph" style:parent-style-name="Standard">
      <style:text-properties style:font-name="Verdana" officeooo:rsid="0006fd06" officeooo:paragraph-rsid="001203f4"/>
    </style:style>
    <style:style style:name="P10" style:family="paragraph" style:parent-style-name="Standard">
      <style:text-properties style:font-name="Verdana" officeooo:rsid="0008c1aa" officeooo:paragraph-rsid="0008c1aa"/>
    </style:style>
    <style:style style:name="P11" style:family="paragraph" style:parent-style-name="Standard">
      <style:text-properties style:font-name="Verdana" officeooo:rsid="0008c1aa" officeooo:paragraph-rsid="0013de91"/>
    </style:style>
    <style:style style:name="P12" style:family="paragraph" style:parent-style-name="Standard">
      <style:text-properties style:font-name="Verdana" officeooo:rsid="000b1756" officeooo:paragraph-rsid="000b1756"/>
    </style:style>
    <style:style style:name="P13" style:family="paragraph" style:parent-style-name="Standard">
      <style:text-properties style:font-name="Verdana" officeooo:rsid="000b1756" officeooo:paragraph-rsid="00155a6f"/>
    </style:style>
    <style:style style:name="P14" style:family="paragraph" style:parent-style-name="Standard">
      <style:text-properties style:font-name="Verdana" officeooo:rsid="000cf028" officeooo:paragraph-rsid="000cf028"/>
    </style:style>
    <style:style style:name="P15" style:family="paragraph" style:parent-style-name="Standard">
      <style:text-properties style:font-name="Verdana" officeooo:rsid="000cf028" officeooo:paragraph-rsid="00157977"/>
    </style:style>
    <style:style style:name="P16" style:family="paragraph" style:parent-style-name="Standard">
      <style:text-properties style:font-name="Verdana" officeooo:rsid="0010136d" officeooo:paragraph-rsid="0010136d"/>
    </style:style>
    <style:style style:name="P17" style:family="paragraph" style:parent-style-name="Standard">
      <style:text-properties style:font-name="Verdana" officeooo:paragraph-rsid="0011d707"/>
    </style:style>
    <style:style style:name="P18" style:family="paragraph" style:parent-style-name="Standard">
      <style:text-properties style:font-name="Verdana" officeooo:rsid="00161c38" officeooo:paragraph-rsid="00161c38"/>
    </style:style>
    <style:style style:name="P19" style:family="paragraph" style:parent-style-name="Standard">
      <style:text-properties style:font-name="Arial" officeooo:rsid="0015f16b" officeooo:paragraph-rsid="0002ecf5"/>
    </style:style>
    <style:style style:name="P20" style:family="paragraph" style:parent-style-name="Standard">
      <style:text-properties style:font-name="Arial" officeooo:rsid="0015f16b" officeooo:paragraph-rsid="0015b0a2"/>
    </style:style>
    <style:style style:name="T1" style:family="text">
      <style:text-properties officeooo:rsid="0005f993"/>
    </style:style>
    <style:style style:name="T2" style:family="text">
      <style:text-properties officeooo:rsid="00096b98"/>
    </style:style>
    <style:style style:name="T3" style:family="text">
      <style:text-properties officeooo:rsid="000b1756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1af8d3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officeooo:rsid="000bc1f0"/>
    </style:style>
    <style:style style:name="T8" style:family="text">
      <style:text-properties style:text-line-through-style="none" style:text-line-through-type="none" officeooo:rsid="000be475"/>
    </style:style>
    <style:style style:name="T9" style:family="text">
      <style:text-properties style:text-line-through-style="none" style:text-line-through-type="none" officeooo:rsid="001a4697"/>
    </style:style>
    <style:style style:name="T10" style:family="text">
      <style:text-properties style:text-line-through-style="none" style:text-line-through-type="none" officeooo:rsid="001af8d3"/>
    </style:style>
    <style:style style:name="T11" style:family="text">
      <style:text-properties officeooo:rsid="000e410d"/>
    </style:style>
    <style:style style:name="T12" style:family="text">
      <style:text-properties officeooo:rsid="0017a56d"/>
    </style:style>
    <style:style style:name="T13" style:family="text">
      <style:text-properties officeooo:rsid="0018f3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flections on belief.</text:p>
      <text:p text:style-name="P7"/>
      <text:p text:style-name="P9">Belief relates to the trust and confidence I place in a person or thing <text:span text:style-name="T12">or idea</text:span>. <text:span text:style-name="T10">T</text:span><text:span text:style-name="T9">rust and confidence come after both thought and experience. </text:span></text:p>
      <text:p text:style-name="P7"/>
      <text:p text:style-name="P3">What does it mean to believe in something?</text:p>
      <text:p text:style-name="P3"/>
      <text:p text:style-name="P11">My beliefs give meaning and purpose to my life. I'll act in certain ways because of my beliefs and I'll seek out certain communities and activities. <text:span text:style-name="T2">I'll make certain commitments of my time and resources </text:span><text:span text:style-name="T3">based on my beliefs.</text:span></text:p>
      <text:p text:style-name="P11"/>
      <text:p text:style-name="P4">How can my beliefs affect my family relationships, <text:span text:style-name="T1">my </text:span>friendships or my work?</text:p>
      <text:p text:style-name="P4"/>
      <text:p text:style-name="P13">My beliefs can be and often are at odds with other people. My beliefs can undermine important relationships and can present difficult choices for me. In this I often learn that I'm not in charge, that life can present challenges that I never expected.</text:p>
      <text:p text:style-name="P13"/>
      <text:p text:style-name="P5">Am I being inauthentic and dishonest if I'm not a vocal advocate for the things I believe in?</text:p>
      <text:p text:style-name="P5"/>
      <text:p text:style-name="P15">Belief is never passive or disconnected from daily experience. I may often want to skate through the challenges of my beliefs, but those beliefs remain with me, insisting that I meet them on their own terms. <text:span text:style-name="T11">I'm inauthentic and dishonest if I'm not a vocal advocate of the things that I believe in.</text:span></text:p>
      <text:p text:style-name="P5"/>
      <text:p text:style-name="P6">How do my beliefs relate to my spiritual and religious outlook?</text:p>
      <text:p text:style-name="P6"/>
      <text:p text:style-name="P18">I cannot feel in touch with my core values and beliefs without <text:span text:style-name="T13">finding</text:span> a sense of peace. Life without this peace is chaotic end empty. The work I do in understanding my core vales and beliefs is therefore essential to my spirituality.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1H11M28S</meta:editing-duration>
    <meta:editing-cycles>29</meta:editing-cycles>
    <meta:generator>LibreOffice/7.3.7.2$Linux_X86_64 LibreOffice_project/30$Build-2</meta:generator>
    <dc:date>2026-06-18T10:28:36.399832024</dc:date>
    <meta:document-statistic meta:table-count="0" meta:image-count="0" meta:object-count="0" meta:page-count="1" meta:paragraph-count="10" meta:word-count="256" meta:character-count="1446" meta:non-whitespace-character-count="1199"/>
    <meta:user-defined meta:name="Info 1"/>
    <meta:user-defined meta:name="Info 2"/>
    <meta:user-defined meta:name="Info 3"/>
    <meta:user-defined meta:name="Info 4"/>
  </office:meta>
</office:document-meta>
</file>