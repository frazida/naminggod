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style:font-name="Liberation Sans" officeooo:rsid="0016aaac" officeooo:paragraph-rsid="0017ea75"/>
    </style:style>
    <style:style style:name="P2" style:family="paragraph" style:parent-style-name="Standard">
      <style:text-properties style:font-name="Liberation Sans" officeooo:rsid="0016aaac" officeooo:paragraph-rsid="001abb52"/>
    </style:style>
    <style:style style:name="P3" style:family="paragraph" style:parent-style-name="Standard">
      <style:text-properties style:font-name="Liberation Sans" officeooo:rsid="0016aaac" officeooo:paragraph-rsid="00193b98"/>
    </style:style>
    <style:style style:name="P4" style:family="paragraph" style:parent-style-name="Standard">
      <style:text-properties style:font-name="Liberation Sans" officeooo:rsid="00154489" officeooo:paragraph-rsid="0017ea75"/>
    </style:style>
    <style:style style:name="P5" style:family="paragraph" style:parent-style-name="Standard">
      <style:text-properties style:font-name="Liberation Sans" officeooo:rsid="00154489" officeooo:paragraph-rsid="00184314"/>
    </style:style>
    <style:style style:name="P6" style:family="paragraph" style:parent-style-name="Standard">
      <style:text-properties style:font-name="Liberation Sans" officeooo:rsid="00154489" officeooo:paragraph-rsid="00193b98"/>
    </style:style>
    <style:style style:name="P7" style:family="paragraph" style:parent-style-name="Standard">
      <style:text-properties style:font-name="Liberation Sans" officeooo:rsid="0013c463" officeooo:paragraph-rsid="0013c463"/>
    </style:style>
    <style:style style:name="P8" style:family="paragraph" style:parent-style-name="Standard">
      <style:text-properties style:font-name="Liberation Sans" officeooo:paragraph-rsid="001ab689"/>
    </style:style>
    <style:style style:name="T1" style:family="text">
      <style:text-properties officeooo:rsid="00184314"/>
    </style:style>
    <style:style style:name="T2" style:family="text">
      <style:text-properties officeooo:rsid="0016aaac"/>
    </style:style>
    <style:style style:name="T3" style:family="text">
      <style:text-properties officeooo:rsid="00151407"/>
    </style:style>
    <style:style style:name="T4" style:family="text">
      <style:text-properties officeooo:rsid="001a3bcc"/>
    </style:style>
    <style:style style:name="T5" style:family="text">
      <style:text-properties officeooo:rsid="0020759c"/>
    </style:style>
    <style:style style:name="T6" style:family="text">
      <style:text-properties officeooo:rsid="0020966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NG.SF-03MAR2026.2026030<text:span text:style-name="T4">9</text:span> ==&gt;</text:p>
      <text:p text:style-name="P4"/>
      <text:p text:style-name="P8">** A better place</text:p>
      <text:p text:style-name="P8"/>
      <text:p text:style-name="P8">It’s all about keeping hope alive. That means holding on to some vision of a better place. This can have some meaning <text:span text:style-name="T5">certainly</text:span> <text:span text:style-name="T6">in </text:span>our day-to-day aspirations, to find that path to more of whatever we value – money, relationships, prestige, health. Aspirations can be the key factor in making life interesting and worthwhile. That’s very constructive and easy to grasp.</text:p>
      <text:p text:style-name="P8">But people often are focused on things more difficult to grasp, like what happens after you die. For some people that line of thought is meaningless. There is absolutely nothing after you die. For them the idea of a better place is meaningless. But what about people who believe that there has to be something after you die. Now that “thing” can be better, about the some, or worse. The belief that what comes after is better is profoundly religious (spiritual, if you like). In one sense this thing represents freedom and release from the bad things in life. In another sense it represents fulfillment and a process of transformation into some fully realized self. But what if what comes after is actually worse? And I’m not talking about eternal perdition or even purgatory. That has always seemed very abstract and simplistic to me. What if it’s just meh, an eternity watching some incredibly stupid game show or having to meet every Monday with your clueless boss.</text:p>
      <text:p text:style-name="P8">I believe that the end is the gateway to a better place. If I go to church and am at all attentive I’m glad that there’s something after and it’s “better.” That’s one of the reasons I keep going to church, not to hedge my bets, so to speak, but to believe that the cosmic arc bends towards an ascendant happiness.</text:p>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Sans UI" svg:font-family="'Andale Sans UI'" style:font-family-generic="system"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none" fo:country="none" style:letter-kerning="true" style:font-name-asian="Andale Sans UI" style:font-size-asian="12pt" style:language-asian="none" style:country-asian="none" style:font-name-complex="Tahoma1"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loext:opacity="0%" style:font-name="Times New Roman" fo:font-size="12pt" fo:language="none" fo:country="none" style:letter-kerning="true" style:font-name-asian="Andale Sans UI" style:font-size-asian="12pt" style:language-asian="none" style:country-asian="none" style:font-name-complex="Tahoma1"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Normal" style:family="paragraph">
      <style:paragraph-properties fo:hyphenation-ladder-count="no-limit"/>
      <style:text-properties fo:hyphenate="false" fo:hyphenation-remain-char-count="2" fo:hyphenation-push-char-count="2" loext:hyphenation-no-caps="false"/>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9-04-16T11:32:02.64</meta:creation-date>
    <meta:editing-duration>PT57M50S</meta:editing-duration>
    <meta:editing-cycles>20</meta:editing-cycles>
    <meta:generator>LibreOffice/7.3.7.2$Linux_X86_64 LibreOffice_project/30$Build-2</meta:generator>
    <dc:date>2026-03-10T13:43:41.853581278</dc:date>
    <meta:document-statistic meta:table-count="0" meta:image-count="0" meta:object-count="0" meta:page-count="1" meta:paragraph-count="5" meta:word-count="294" meta:character-count="1694" meta:non-whitespace-character-count="1404"/>
    <meta:user-defined meta:name="Info 1"/>
    <meta:user-defined meta:name="Info 2"/>
    <meta:user-defined meta:name="Info 3"/>
    <meta:user-defined meta:name="Info 4"/>
  </office:meta>
</office:document-meta>
</file>